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TitleP" style:family="paragraph" style:parent-style-name="Standard">
      <style:paragraph-properties fo:text-align="center" fo:margin-top="0in" fo:margin-bottom="0.03in"/>
      <style:text-properties style:font-name="Liberation Sans" fo:font-family="'Liberation Sans'" style:font-family-generic="swiss" fo:font-size="24pt" fo:font-weight="bold" fo:color="#0369a3"/>
    </style:style>
    <style:style style:name="SubtitleP" style:family="paragraph" style:parent-style-name="Standard">
      <style:paragraph-properties fo:text-align="center" fo:margin-top="0in" fo:margin-bottom="0.05in" fo:border-bottom="1pt solid #0369a3" fo:padding-bottom="0.08in"/>
      <style:text-properties style:font-name="Liberation Sans" fo:font-family="'Liberation Sans'" style:font-family-generic="swiss" fo:font-size="11pt" fo:font-style="italic" fo:color="#555555"/>
    </style:style>
    <style:style style:name="H1" style:family="paragraph" style:parent-style-name="Standard">
      <style:paragraph-properties fo:margin-top="0.22in" fo:margin-bottom="0.06in" fo:keep-with-next="always"/>
      <style:text-properties style:font-name="Liberation Sans" fo:font-family="'Liberation Sans'" style:font-family-generic="swiss" fo:font-size="14pt" fo:font-weight="bold" fo:color="#0369a3"/>
    </style:style>
    <style:style style:name="BodyP" style:family="paragraph" style:parent-style-name="Standard">
      <style:paragraph-properties fo:margin-top="0in" fo:margin-bottom="0.08in" fo:line-height="115%"/>
      <style:text-properties style:font-name="Liberation Sans" fo:font-family="'Liberation Sans'" style:font-family-generic="swiss" fo:font-size="11pt" fo:color="#222222"/>
    </style:style>
    <style:style style:name="CodeP" style:family="paragraph" style:parent-style-name="Standard">
      <style:paragraph-properties fo:margin-top="0in" fo:margin-bottom="0in" fo:line-height="105%" fo:background-color="#f4f6f8" fo:padding-top="0in" fo:padding-bottom="0in" fo:padding-left="0.12in" fo:padding-right="0.12in" fo:keep-together="always"/>
      <style:text-properties style:font-name="Liberation Mono" fo:font-family="'Liberation Mono'" style:font-family-generic="modern" style:font-pitch="fixed" fo:font-size="8.5pt" fo:color="#1a1a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iver Disease Prediction</text:p>
      <text:p text:style-name="SubtitleP">Binary Logistic Regression in R — Model Output &amp; Diagnostics</text:p>
      <text:p text:style-name="BodyP">Explanatory logistic regression (glm, binomial family) modelling the probability of liver disease from clinical blood markers. The dataset contains 570 unique patients after removing duplicates. Below are the fitted model, its overall significance, effect sizes (odds ratios), and the standard regression assumption checks.</text:p>
      <text:p text:style-name="H1">1. Fitted Model — summary(LiverModel.1)</text:p>
      <text:p text:style-name="BodyP">Coefficients on the log-odds scale. DB, TP and ALB are statistically significant predictors (p &lt; 0.05); ALB has a protective (negative) effect.</text:p>
      <text:p text:style-name="CodeP"/>
      <text:p text:style-name="CodeP">Call:</text:p>
      <text:p text:style-name="CodeP">glm(formula<text:s/>=<text:s/>Selector<text:s/>~<text:s/>TB<text:s/>+<text:s/>DB<text:s/>+<text:s/>Alkphos<text:s/>+<text:s/>Sgpt<text:s/>+<text:s/>Sgot<text:s/>+<text:s/>TP<text:s/>+</text:p>
      <text:p text:style-name="CodeP"><text:s text:c="4"/>ALB,<text:s/>family<text:s/>=<text:s/>binomial(),<text:s/>data<text:s/>=<text:s/>LiverData)</text:p>
      <text:p text:style-name="CodeP"/>
      <text:p text:style-name="CodeP">Coefficients:</text:p>
      <text:p text:style-name="CodeP"><text:s text:c="14"/>Estimate<text:s/>Std.<text:s/>Error<text:s/>z<text:s/>value<text:s/>Pr(&gt;|z|)</text:p>
      <text:p text:style-name="CodeP">(Intercept)<text:s/>-0.6211930<text:s text:c="2"/>0.6554442<text:s text:c="2"/>-0.948<text:s text:c="2"/>0.34326</text:p>
      <text:p text:style-name="CodeP">TB<text:s text:c="11"/>0.0137504<text:s text:c="2"/>0.1041096<text:s text:c="3"/>0.132<text:s text:c="2"/>0.89492</text:p>
      <text:p text:style-name="CodeP">DB<text:s text:c="11"/>0.5524006<text:s text:c="2"/>0.2788175<text:s text:c="3"/>1.981<text:s text:c="2"/>0.04757<text:s/>*</text:p>
      <text:p text:style-name="CodeP">Alkphos<text:s text:c="6"/>0.0011077<text:s text:c="2"/>0.0007598<text:s text:c="3"/>1.458<text:s text:c="2"/>0.14489</text:p>
      <text:p text:style-name="CodeP">Sgpt<text:s text:c="9"/>0.0094342<text:s text:c="2"/>0.0048873<text:s text:c="3"/>1.930<text:s text:c="2"/>0.05356<text:s/>.</text:p>
      <text:p text:style-name="CodeP">Sgot<text:s text:c="9"/>0.0029389<text:s text:c="2"/>0.0031517<text:s text:c="3"/>0.932<text:s text:c="2"/>0.35109</text:p>
      <text:p text:style-name="CodeP">TP<text:s text:c="11"/>0.3640501<text:s text:c="2"/>0.1773259<text:s text:c="3"/>2.053<text:s text:c="2"/>0.04007<text:s/>*</text:p>
      <text:p text:style-name="CodeP">ALB<text:s text:c="9"/>-0.6632389<text:s text:c="2"/>0.2556939<text:s text:c="2"/>-2.594<text:s text:c="2"/>0.00949<text:s/>**</text:p>
      <text:p text:style-name="CodeP">---</text:p>
      <text:p text:style-name="CodeP">Signif.<text:s/>codes:<text:s text:c="2"/>0<text:s/>'***'<text:s/>0.001<text:s/>'**'<text:s/>0.01<text:s/>'*'<text:s/>0.05<text:s/>'.'<text:s/>0.1<text:s/>'<text:s/>'<text:s/>1</text:p>
      <text:p text:style-name="CodeP"/>
      <text:p text:style-name="CodeP">(Dispersion<text:s/>parameter<text:s/>for<text:s/>binomial<text:s/>family<text:s/>taken<text:s/>to<text:s/>be<text:s/>1)</text:p>
      <text:p text:style-name="CodeP"/>
      <text:p text:style-name="CodeP"><text:s text:c="4"/>Null<text:s/>deviance:<text:s/>684.11<text:s text:c="2"/>on<text:s/>569<text:s text:c="2"/>degrees<text:s/>of<text:s/>freedom</text:p>
      <text:p text:style-name="CodeP">Residual<text:s/>deviance:<text:s/>569.60<text:s text:c="2"/>on<text:s/>562<text:s text:c="2"/>degrees<text:s/>of<text:s/>freedom</text:p>
      <text:p text:style-name="CodeP">AIC:<text:s/>585.6</text:p>
      <text:p text:style-name="CodeP"/>
      <text:p text:style-name="CodeP">Number<text:s/>of<text:s/>Fisher<text:s/>Scoring<text:s/>iterations:<text:s/>7</text:p>
      <text:p text:style-name="CodeP"/>
      <text:p text:style-name="BodyP"/>
      <text:p text:style-name="H1">2. Overall Model Significance (Likelihood-Ratio Chi-Square)</text:p>
      <text:p text:style-name="BodyP">The model explains the outcome significantly better than an intercept-only model: chi-square = 114.51 on 7 df, p &lt; 0.001.</text:p>
      <text:p text:style-name="CodeP"/>
      <text:p text:style-name="CodeP">&gt;<text:s/>modelChi<text:s/>&lt;-<text:s/>LiverModel.1$null.deviance<text:s/>-<text:s/>LiverModel.1$deviance</text:p>
      <text:p text:style-name="CodeP">&gt;<text:s/>modelChi</text:p>
      <text:p text:style-name="CodeP">[1]<text:s/>114.5117</text:p>
      <text:p text:style-name="CodeP">&gt;<text:s/>chidf<text:s/>&lt;-<text:s/>LiverModel.1$df.null<text:s/>-<text:s/>LiverModel.1$df.residual</text:p>
      <text:p text:style-name="CodeP">&gt;<text:s/>chidf</text:p>
      <text:p text:style-name="CodeP">[1]<text:s/>7</text:p>
      <text:p text:style-name="CodeP">&gt;<text:s/>chisq.prob<text:s/>&lt;-<text:s/>1<text:s/>-<text:s/>pchisq(modelChi,<text:s/>chidf)</text:p>
      <text:p text:style-name="CodeP">&gt;<text:s/>chisq.prob</text:p>
      <text:p text:style-name="CodeP">[1]<text:s/>0</text:p>
      <text:p text:style-name="CodeP"/>
      <text:p text:style-name="BodyP"/>
      <text:p text:style-name="H1">3. Odds Ratios &amp;amp; 95% Confidence Intervals</text:p>
      <text:p text:style-name="BodyP">Exponentiated coefficients give odds ratios. DB (OR ≈ 1.74) and TP (OR ≈ 1.44) increase the odds of disease; ALB (OR ≈ 0.52) lowers them. Confidence intervals that exclude 1 confirm significance.</text:p>
      <text:p text:style-name="CodeP"/>
      <text:p text:style-name="CodeP">&gt;<text:s/>LiverModel.1$coefficients</text:p>
      <text:p text:style-name="CodeP"><text:s/>(Intercept)<text:s text:c="11"/>TB<text:s text:c="11"/>DB<text:s text:c="6"/>Alkphos<text:s text:c="9"/>Sgpt<text:s text:c="9"/>Sgot</text:p>
      <text:p text:style-name="CodeP">-0.621192959<text:s text:c="2"/>0.013750448<text:s text:c="2"/>0.552400590<text:s text:c="2"/>0.001107714<text:s text:c="2"/>0.009434218<text:s text:c="2"/>0.002938912</text:p>
      <text:p text:style-name="CodeP"><text:s text:c="10"/>TP<text:s text:c="10"/>ALB</text:p>
      <text:p text:style-name="CodeP"><text:s/>0.364050104<text:s/>-0.663238907</text:p>
      <text:p text:style-name="CodeP"/>
      <text:p text:style-name="CodeP">&gt;<text:s/>exp(LiverModel.1$coefficients)</text:p>
      <text:p text:style-name="CodeP">(Intercept)<text:s text:c="10"/>TB<text:s text:c="10"/>DB<text:s text:c="5"/>Alkphos<text:s text:c="8"/>Sgpt<text:s text:c="8"/>Sgot</text:p>
      <text:p text:style-name="CodeP"><text:s text:c="2"/>0.5373031<text:s text:c="3"/>1.0138454<text:s text:c="3"/>1.7374188<text:s text:c="3"/>1.0011083<text:s text:c="3"/>1.0094789<text:s text:c="3"/>1.0029432</text:p>
      <text:p text:style-name="CodeP"><text:s text:c="9"/>TP<text:s text:c="9"/>ALB</text:p>
      <text:p text:style-name="CodeP"><text:s text:c="2"/>1.4391463<text:s text:c="3"/>0.5151800</text:p>
      <text:p text:style-name="CodeP"/>
      <text:p text:style-name="CodeP">&gt;<text:s/>exp(confint(LiverModel.1))</text:p>
      <text:p text:style-name="CodeP">Waiting<text:s/>for<text:s/>profiling<text:s/>to<text:s/>be<text:s/>done...</text:p>
      <text:p text:style-name="CodeP"><text:s text:c="16"/>2.5<text:s/>%<text:s text:c="4"/>97.5<text:s/>%</text:p>
      <text:p text:style-name="CodeP">(Intercept)<text:s/>0.1475251<text:s/>1.9439664</text:p>
      <text:p text:style-name="CodeP">TB<text:s text:c="10"/>0.9275245<text:s/>1.5951998</text:p>
      <text:p text:style-name="CodeP">DB<text:s text:c="10"/>0.8380706<text:s/>2.8943840</text:p>
      <text:p text:style-name="CodeP">Alkphos<text:s text:c="5"/>0.9997962<text:s/>1.0027864</text:p>
      <text:p text:style-name="CodeP">Sgpt<text:s text:c="8"/>1.0006256<text:s/>1.0199468</text:p>
      <text:p text:style-name="CodeP">Sgot<text:s text:c="8"/>0.9973740<text:s/>1.0097045</text:p>
      <text:p text:style-name="CodeP">TP<text:s text:c="10"/>1.0188368<text:s/>2.0447592</text:p>
      <text:p text:style-name="CodeP">ALB<text:s text:c="9"/>0.3100633<text:s/>0.8464802</text:p>
      <text:p text:style-name="CodeP"/>
      <text:p text:style-name="BodyP"/>
      <text:p text:style-name="H1">4. Multicollinearity — Variance Inflation Factor (VIF)</text:p>
      <text:p text:style-name="BodyP">All VIF values are below 5 (max ≈ 3.9 for TP), so multicollinearity is not a concern. 1/VIF (tolerance) confirms this.</text:p>
      <text:p text:style-name="CodeP"/>
      <text:p text:style-name="CodeP">&gt;<text:s/>vif(LiverModel.1)</text:p>
      <text:p text:style-name="CodeP"><text:s text:c="6"/>TB<text:s text:c="7"/>DB<text:s text:c="2"/>Alkphos<text:s text:c="5"/>Sgpt<text:s text:c="5"/>Sgot<text:s text:c="7"/>TP<text:s text:c="6"/>ALB</text:p>
      <text:p text:style-name="CodeP">2.171699<text:s/>2.308712<text:s/>1.111823<text:s/>1.770026<text:s/>1.761629<text:s/>3.763067<text:s/>3.897670</text:p>
      <text:p text:style-name="CodeP"/>
      <text:p text:style-name="CodeP">&gt;<text:s/>1/vif(LiverModel.1)</text:p>
      <text:p text:style-name="CodeP"><text:s text:c="7"/>TB<text:s text:c="8"/>DB<text:s text:c="3"/>Alkphos<text:s text:c="6"/>Sgpt<text:s text:c="6"/>Sgot<text:s text:c="8"/>TP<text:s text:c="7"/>ALB</text:p>
      <text:p text:style-name="CodeP">0.4604690<text:s/>0.4331419<text:s/>0.8994233<text:s/>0.5649633<text:s/>0.5676563<text:s/>0.2657407<text:s/>0.2565635</text:p>
      <text:p text:style-name="CodeP"/>
      <text:p text:style-name="BodyP"/>
      <text:p text:style-name="H1">5. Correlation Matrix of Numeric Features</text:p>
      <text:p text:style-name="BodyP">Pearson correlations (result$r) and their p-values (result$P). Note the strong pairwise correlations TB–DB (0.87), Sgpt–Sgot (0.79) and TP–ALB (0.78).</text:p>
      <text:p text:style-name="CodeP"/>
      <text:p text:style-name="CodeP">&gt;<text:s/>num_data<text:s/>&lt;-<text:s/>LiverData[sapply(LiverData,<text:s/>is.numeric)]</text:p>
      <text:p text:style-name="CodeP">&gt;<text:s/>result<text:s/>&lt;-<text:s/>rcorr(as.matrix(num_data))</text:p>
      <text:p text:style-name="CodeP">&gt;<text:s/>result$r<text:s text:c="3"/>#<text:s/>correlations</text:p>
      <text:p text:style-name="CodeP"><text:s text:c="19"/>Age<text:s text:c="11"/>TB<text:s text:c="12"/>DB<text:s text:c="5"/>Alkphos<text:s text:c="9"/>Sgpt</text:p>
      <text:p text:style-name="CodeP">Age<text:s text:c="8"/>1.000000000<text:s text:c="2"/>0.011500166<text:s text:c="2"/>0.0070496346<text:s text:c="2"/>0.08167251<text:s text:c="2"/>-0.08338338</text:p>
      <text:p text:style-name="CodeP">TB<text:s text:c="9"/>0.011500166<text:s text:c="2"/>1.000000000<text:s text:c="2"/>0.8741156676<text:s text:c="2"/>0.20623926<text:s text:c="3"/>0.21747068</text:p>
      <text:p text:style-name="CodeP">DB<text:s text:c="9"/>0.007049635<text:s text:c="2"/>0.874115668<text:s text:c="2"/>1.0000000000<text:s text:c="2"/>0.23460937<text:s text:c="3"/>0.23745043</text:p>
      <text:p text:style-name="CodeP">Alkphos<text:s text:c="4"/>0.081672511<text:s text:c="2"/>0.206239259<text:s text:c="2"/>0.2346093658<text:s text:c="2"/>1.00000000<text:s text:c="3"/>0.12682976</text:p>
      <text:p text:style-name="CodeP">Sgpt<text:s text:c="6"/>-0.083383380<text:s text:c="2"/>0.217470681<text:s text:c="2"/>0.2374504330<text:s text:c="2"/>0.12682976<text:s text:c="3"/>1.00000000</text:p>
      <text:p text:style-name="CodeP">Sgot<text:s text:c="6"/>-0.016753303<text:s text:c="2"/>0.238677737<text:s text:c="2"/>0.2584893568<text:s text:c="2"/>0.16722982<text:s text:c="3"/>0.79185718</text:p>
      <text:p text:style-name="CodeP">TP<text:s text:c="8"/>-0.197051624<text:s/>-0.008588269<text:s/>-0.0008750039<text:s/>-0.03004849<text:s text:c="2"/>-0.03519349</text:p>
      <text:p text:style-name="CodeP">ALB<text:s text:c="7"/>-0.271169714<text:s/>-0.224124439<text:s/>-0.2307513669<text:s/>-0.16831764<text:s text:c="2"/>-0.02797280</text:p>
      <text:p text:style-name="CodeP">A.G.Ratio<text:s/>-0.215506271<text:s/>-0.207473516<text:s/>-0.2012275157<text:s/>-0.23584767<text:s text:c="2"/>-0.00639423</text:p>
      <text:p text:style-name="CodeP"><text:s text:c="18"/>Sgot<text:s text:c="12"/>TP<text:s text:c="10"/>ALB<text:s text:c="4"/>A.G.Ratio</text:p>
      <text:p text:style-name="CodeP">Age<text:s text:c="8"/>-0.01675330<text:s/>-0.1970516239<text:s text:c="2"/>-0.27116971<text:s text:c="2"/>-0.21550627</text:p>
      <text:p text:style-name="CodeP">TB<text:s text:c="10"/>0.23867774<text:s/>-0.0085882686<text:s text:c="2"/>-0.22412444<text:s text:c="2"/>-0.20747352</text:p>
      <text:p text:style-name="CodeP">DB<text:s text:c="10"/>0.25848936<text:s/>-0.0008750039<text:s text:c="2"/>-0.23075137<text:s text:c="2"/>-0.20122752</text:p>
      <text:p text:style-name="CodeP">Alkphos<text:s text:c="5"/>0.16722982<text:s/>-0.0300484933<text:s text:c="2"/>-0.16831764<text:s text:c="2"/>-0.23584767</text:p>
      <text:p text:style-name="CodeP">Sgpt<text:s text:c="8"/>0.79185718<text:s/>-0.0351934945<text:s text:c="2"/>-0.02797280<text:s text:c="2"/>-0.00639423</text:p>
      <text:p text:style-name="CodeP">Sgot<text:s text:c="8"/>1.00000000<text:s/>-0.0219996289<text:s text:c="2"/>-0.08518048<text:s text:c="2"/>-0.07278262</text:p>
      <text:p text:style-name="CodeP">TP<text:s text:c="9"/>-0.02199963<text:s text:c="2"/>1.0000000000<text:s text:c="3"/>0.78473136<text:s text:c="3"/>0.23350330</text:p>
      <text:p text:style-name="CodeP">ALB<text:s text:c="8"/>-0.08518048<text:s text:c="2"/>0.7847313644<text:s text:c="3"/>1.00000000<text:s text:c="3"/>0.68385426</text:p>
      <text:p text:style-name="CodeP">A.G.Ratio<text:s text:c="2"/>-0.07278262<text:s text:c="2"/>0.2335033024<text:s text:c="3"/>0.68385426<text:s text:c="3"/>1.00000000</text:p>
      <text:p text:style-name="CodeP"/>
      <text:p text:style-name="CodeP">&gt;<text:s/>result$P<text:s text:c="3"/>#<text:s/>p-values</text:p>
      <text:p text:style-name="CodeP"><text:s text:c="19"/>Age<text:s text:c="11"/>TB<text:s text:c="11"/>DB<text:s text:c="6"/>Alkphos<text:s text:c="9"/>Sgpt</text:p>
      <text:p text:style-name="CodeP">Age<text:s text:c="17"/>NA<text:s/>7.841084e-01<text:s/>8.666302e-01<text:s/>5.130966e-02<text:s/>4.660778e-02</text:p>
      <text:p text:style-name="CodeP">TB<text:s text:c="8"/>7.841084e-01<text:s text:c="11"/>NA<text:s/>0.000000e+00<text:s/>6.814494e-07<text:s/>1.575360e-07</text:p>
      <text:p text:style-name="CodeP">DB<text:s text:c="8"/>8.666302e-01<text:s/>0.000000e+00<text:s text:c="11"/>NA<text:s/>1.442843e-08<text:s/>9.530234e-09</text:p>
      <text:p text:style-name="CodeP">Alkphos<text:s text:c="3"/>5.130966e-02<text:s/>6.814494e-07<text:s/>1.442843e-08<text:s text:c="11"/>NA<text:s/>2.416297e-03</text:p>
      <text:p text:style-name="CodeP">Sgpt<text:s text:c="6"/>4.660778e-02<text:s/>1.575360e-07<text:s/>9.530234e-09<text:s/>2.416297e-03<text:s text:c="11"/>NA</text:p>
      <text:p text:style-name="CodeP">Sgot<text:s text:c="6"/>6.897977e-01<text:s/>7.953939e-09<text:s/>3.738376e-10<text:s/>6.018625e-05<text:s/>0.000000e+00</text:p>
      <text:p text:style-name="CodeP">TP<text:s text:c="8"/>2.129022e-06<text:s/>8.378880e-01<text:s/>9.833696e-01<text:s/>4.740007e-01<text:s/>4.016666e-01</text:p>
      <text:p text:style-name="CodeP">ALB<text:s text:c="7"/>4.591105e-11<text:s/>6.369731e-08<text:s/>2.512623e-08<text:s/>5.378141e-05<text:s/>5.050879e-01</text:p>
      <text:p text:style-name="CodeP">A.G.Ratio<text:s/>2.047066e-07<text:s/>5.824063e-07<text:s/>1.276851e-06<text:s/>1.205029e-08<text:s/>8.789294e-01</text:p>
      <text:p text:style-name="CodeP"><text:s text:c="18"/>Sgot<text:s text:c="11"/>TP<text:s text:c="10"/>ALB<text:s text:c="4"/>A.G.Ratio</text:p>
      <text:p text:style-name="CodeP">Age<text:s text:c="7"/>6.897977e-01<text:s/>2.129022e-06<text:s/>4.591105e-11<text:s/>2.047066e-07</text:p>
      <text:p text:style-name="CodeP">TB<text:s text:c="8"/>7.953939e-09<text:s/>8.378880e-01<text:s/>6.369731e-08<text:s/>5.824063e-07</text:p>
      <text:p text:style-name="CodeP">DB<text:s text:c="8"/>3.738376e-10<text:s/>9.833696e-01<text:s/>2.512623e-08<text:s/>1.276851e-06</text:p>
      <text:p text:style-name="CodeP">Alkphos<text:s text:c="3"/>6.018625e-05<text:s/>4.740007e-01<text:s/>5.378141e-05<text:s/>1.205029e-08</text:p>
      <text:p text:style-name="CodeP">Sgpt<text:s text:c="6"/>0.000000e+00<text:s/>4.016666e-01<text:s/>5.050879e-01<text:s/>8.789294e-01</text:p>
      <text:p text:style-name="CodeP">Sgot<text:s text:c="16"/>NA<text:s/>6.001781e-01<text:s/>4.206386e-02<text:s/>8.253733e-02</text:p>
      <text:p text:style-name="CodeP">TP<text:s text:c="8"/>6.001781e-01<text:s text:c="11"/>NA<text:s/>0.000000e+00<text:s/>1.693239e-08</text:p>
      <text:p text:style-name="CodeP">ALB<text:s text:c="7"/>4.206386e-02<text:s/>0.000000e+00<text:s text:c="11"/>NA<text:s/>0.000000e+00</text:p>
      <text:p text:style-name="CodeP">A.G.Ratio<text:s/>8.253733e-02<text:s/>1.693239e-08<text:s/>0.000000e+00<text:s text:c="11"/>NA</text:p>
      <text:p text:style-name="CodeP"/>
      <text:p text:style-name="BodyP"/>
      <text:p text:style-name="H1">6. Linearity of the Logit (Box-Tidwell Test)</text:p>
      <text:p text:style-name="BodyP">Each continuous predictor is multiplied by its log and added to the model. None of the interaction terms (logTB … logALB) is significant, so the linearity-of-the-logit assumption holds.</text:p>
      <text:p text:style-name="CodeP"/>
      <text:p text:style-name="CodeP">&gt;<text:s/>LiverData$logTB<text:s text:c="6"/>&lt;-<text:s/>log(LiverData$TB)<text:s text:c="6"/>*<text:s/>LiverData$TB</text:p>
      <text:p text:style-name="CodeP">&gt;<text:s/>LiverData$logDB<text:s text:c="6"/>&lt;-<text:s/>log(LiverData$DB)<text:s text:c="6"/>*<text:s/>LiverData$DB</text:p>
      <text:p text:style-name="CodeP">&gt;<text:s/>LiverData$logAlkphos<text:s/>&lt;-<text:s/>log(LiverData$Alkphos)<text:s/>*<text:s/>LiverData$Alkphos</text:p>
      <text:p text:style-name="CodeP">&gt;<text:s/>LiverData$logSgpt<text:s text:c="4"/>&lt;-<text:s/>log(LiverData$Sgpt)<text:s text:c="4"/>*<text:s/>LiverData$Sgpt</text:p>
      <text:p text:style-name="CodeP">&gt;<text:s/>LiverData$logSgot<text:s text:c="4"/>&lt;-<text:s/>log(LiverData$Sgot)<text:s text:c="4"/>*<text:s/>LiverData$Sgot</text:p>
      <text:p text:style-name="CodeP">&gt;<text:s/>LiverData$logTP<text:s text:c="6"/>&lt;-<text:s/>log(LiverData$TP)<text:s text:c="6"/>*<text:s/>LiverData$TP</text:p>
      <text:p text:style-name="CodeP">&gt;<text:s/>LiverData$logALB<text:s text:c="5"/>&lt;-<text:s/>log(LiverData$ALB)<text:s text:c="5"/>*<text:s/>LiverData$ALB</text:p>
      <text:p text:style-name="CodeP">&gt;</text:p>
      <text:p text:style-name="CodeP">&gt;<text:s/>LiverTest.1<text:s/>&lt;-<text:s/>glm(Selector<text:s/>~<text:s/>TB<text:s/>+<text:s/>DB<text:s/>+<text:s/>Alkphos<text:s/>+<text:s/>Sgpt<text:s/>+<text:s/>Sgot<text:s/>+<text:s/>TP<text:s/>+<text:s/>ALB</text:p>
      <text:p text:style-name="CodeP">+<text:s text:c="20"/>+<text:s/>logTB<text:s/>+<text:s/>logDB<text:s/>+<text:s/>logAlkphos<text:s/>+<text:s/>logSgpt</text:p>
      <text:p text:style-name="CodeP">+<text:s text:c="20"/>+<text:s/>logSgot<text:s/>+<text:s/>logTP<text:s/>+<text:s/>logALB,</text:p>
      <text:p text:style-name="CodeP">+<text:s text:c="20"/>data<text:s/>=<text:s/>LiverData,<text:s/>family<text:s/>=<text:s/>binomial())</text:p>
      <text:p text:style-name="CodeP">Warning<text:s/>message:</text:p>
      <text:p text:style-name="CodeP">glm.fit:<text:s/>fitted<text:s/>probabilities<text:s/>numerically<text:s/>0<text:s/>or<text:s/>1<text:s/>occurred</text:p>
      <text:p text:style-name="CodeP">&gt;</text:p>
      <text:p text:style-name="CodeP">&gt;<text:s/>summary(LiverTest.1)</text:p>
      <text:p text:style-name="CodeP"/>
      <text:p text:style-name="CodeP">Call:</text:p>
      <text:p text:style-name="CodeP">glm(formula<text:s/>=<text:s/>Selector<text:s/>~<text:s/>TB<text:s/>+<text:s/>DB<text:s/>+<text:s/>Alkphos<text:s/>+<text:s/>Sgpt<text:s/>+<text:s/>Sgot<text:s/>+<text:s/>TP<text:s/>+</text:p>
      <text:p text:style-name="CodeP"><text:s text:c="4"/>ALB<text:s/>+<text:s/>logTB<text:s/>+<text:s/>logDB<text:s/>+<text:s/>logAlkphos<text:s/>+<text:s/>logSgpt<text:s/>+<text:s/>logSgot<text:s/>+<text:s/>logTP<text:s/>+</text:p>
      <text:p text:style-name="CodeP"><text:s text:c="4"/>logALB,<text:s/>family<text:s/>=<text:s/>binomial(),<text:s/>data<text:s/>=<text:s/>LiverData)</text:p>
      <text:p text:style-name="CodeP"/>
      <text:p text:style-name="CodeP">Coefficients:</text:p>
      <text:p text:style-name="CodeP"><text:s text:c="14"/>Estimate<text:s/>Std.<text:s/>Error<text:s/>z<text:s/>value<text:s/>Pr(&gt;|z|)</text:p>
      <text:p text:style-name="CodeP">(Intercept)<text:s text:c="2"/>3.5500814<text:s text:c="2"/>4.4910929<text:s text:c="3"/>0.790<text:s text:c="4"/>0.429</text:p>
      <text:p text:style-name="CodeP">TB<text:s text:c="10"/>-0.2185576<text:s text:c="2"/>0.7765495<text:s text:c="2"/>-0.281<text:s text:c="4"/>0.778</text:p>
      <text:p text:style-name="CodeP">DB<text:s text:c="11"/>1.0318002<text:s text:c="2"/>1.0949233<text:s text:c="3"/>0.942<text:s text:c="4"/>0.346</text:p>
      <text:p text:style-name="CodeP">Alkphos<text:s text:c="6"/>0.0108270<text:s text:c="2"/>0.0094970<text:s text:c="3"/>1.140<text:s text:c="4"/>0.254</text:p>
      <text:p text:style-name="CodeP">Sgpt<text:s text:c="9"/>0.0297342<text:s text:c="2"/>0.0221047<text:s text:c="3"/>1.345<text:s text:c="4"/>0.179</text:p>
      <text:p text:style-name="CodeP">Sgot<text:s text:c="8"/>-0.0015156<text:s text:c="2"/>0.0263770<text:s text:c="2"/>-0.057<text:s text:c="4"/>0.954</text:p>
      <text:p text:style-name="CodeP">TP<text:s text:c="10"/>-3.6092628<text:s text:c="2"/>2.7652129<text:s text:c="2"/>-1.305<text:s text:c="4"/>0.192</text:p>
      <text:p text:style-name="CodeP">ALB<text:s text:c="10"/>2.0993022<text:s text:c="2"/>2.3205588<text:s text:c="3"/>0.905<text:s text:c="4"/>0.366</text:p>
      <text:p text:style-name="CodeP">logTB<text:s text:c="8"/>0.0528611<text:s text:c="2"/>0.1768242<text:s text:c="3"/>0.299<text:s text:c="4"/>0.765</text:p>
      <text:p text:style-name="CodeP">logDB<text:s text:c="7"/>-0.1964960<text:s text:c="2"/>0.3350623<text:s text:c="2"/>-0.586<text:s text:c="4"/>0.558</text:p>
      <text:p text:style-name="CodeP">logAlkphos<text:s text:c="2"/>-0.0013332<text:s text:c="2"/>0.0012862<text:s text:c="2"/>-1.037<text:s text:c="4"/>0.300</text:p>
      <text:p text:style-name="CodeP">logSgpt<text:s text:c="5"/>-0.0039036<text:s text:c="2"/>0.0036084<text:s text:c="2"/>-1.082<text:s text:c="4"/>0.279</text:p>
      <text:p text:style-name="CodeP">logSgot<text:s text:c="6"/>0.0007709<text:s text:c="2"/>0.0045215<text:s text:c="3"/>0.170<text:s text:c="4"/>0.865</text:p>
      <text:p text:style-name="CodeP">logTP<text:s text:c="8"/>1.3862749<text:s text:c="2"/>0.9696619<text:s text:c="3"/>1.430<text:s text:c="4"/>0.153</text:p>
      <text:p text:style-name="CodeP">logALB<text:s text:c="6"/>-1.2668662<text:s text:c="2"/>1.0652582<text:s text:c="2"/>-1.189<text:s text:c="4"/>0.234</text:p>
      <text:p text:style-name="CodeP"/>
      <text:p text:style-name="CodeP">(Dispersion<text:s/>parameter<text:s/>for<text:s/>binomial<text:s/>family<text:s/>taken<text:s/>to<text:s/>be<text:s/>1)</text:p>
      <text:p text:style-name="CodeP"/>
      <text:p text:style-name="CodeP"><text:s text:c="4"/>Null<text:s/>deviance:<text:s/>684.11<text:s text:c="2"/>on<text:s/>569<text:s text:c="2"/>degrees<text:s/>of<text:s/>freedom</text:p>
      <text:p text:style-name="CodeP">Residual<text:s/>deviance:<text:s/>565.73<text:s text:c="2"/>on<text:s/>555<text:s text:c="2"/>degrees<text:s/>of<text:s/>freedom</text:p>
      <text:p text:style-name="CodeP">AIC:<text:s/>595.73</text:p>
      <text:p text:style-name="CodeP"/>
      <text:p text:style-name="CodeP">Number<text:s/>of<text:s/>Fisher<text:s/>Scoring<text:s/>iterations:<text:s/>9</text:p>
      <text:p text:style-name="Code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0T17:09:26.117022000</meta:creation-date>
    <dc:date>2026-06-10T17:13:49.608269000</dc:date>
    <meta:editing-duration>PT4M24S</meta:editing-duration>
    <meta:editing-cycles>1</meta:editing-cycles>
    <meta:document-statistic meta:table-count="0" meta:image-count="0" meta:object-count="0" meta:page-count="3" meta:paragraph-count="137" meta:word-count="734" meta:character-count="7066" meta:non-whitespace-character-count="5252"/>
    <meta:generator>LibreOffice/26.2.3.2$MacOSX_X86_64 LibreOffice_project/70e089b17412e4cb7773e41413306b17a2328c34</meta:generator>
  </office:meta>
</office:document-meta>
</file>